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10.439cm"/>
    </style:style>
    <style:style style:name="co5" style:family="table-column">
      <style:table-column-properties fo:break-before="auto" style:column-width="1.882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0.5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11pt" style:font-size-asian="11pt" style:font-size-complex="11pt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fo:border-bottom="0.74pt groove #2a6099" fo:background-color="#b2b2b2" style:text-align-source="fix" style:repeat-content="false" fo:border-left="0.74pt groove #2a6099" fo:border-right="none" fo:border-top="0.74pt groove #2a6099"/>
      <style:paragraph-properties fo:text-align="center" fo:margin-left="0c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style:font-name="Calibri"/>
    </style:style>
    <style:style style:name="ce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-bottom="0.74pt groove #2a6099" fo:background-color="#b2b2b2" style:text-align-source="fix" style:repeat-content="false" fo:border-left="none" fo:border-right="none" fo:border-top="0.74pt groove #2a6099"/>
      <style:paragraph-properties fo:text-align="center" fo:margin-left="0cm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Calibri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74pt groove #000000" fo:border-right="none" fo:border-top="0.74pt groove #000000"/>
    </style:style>
    <style:style style:name="ce32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cm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font-name="Calibri" fo:font-weight="normal" style:font-weight-asian="normal" style:font-weight-complex="normal"/>
    </style:style>
    <style:style style:name="ce37" style:family="table-cell" style:parent-style-name="Default">
      <style:table-cell-properties fo:border-bottom="none" fo:border-left="0.74pt groove #000000" fo:border-right="none" fo:border-top="none"/>
    </style:style>
    <style:style style:name="ce38" style:family="table-cell" style:parent-style-name="Default">
      <style:table-cell-properties fo:border-bottom="0.74pt groove #000000" fo:border-left="0.74pt groove #000000" fo:border-right="none" fo:border-top="none"/>
      <style:text-properties style:font-name="Calibri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0.74pt groove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groove #000000" style:text-align-source="fix" style:repeat-content="false" fo:wrap-option="wrap" fo:border-left="none" fo:border-right="0.74pt groove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groove #2a6099" fo:background-color="#b2b2b2" fo:border-left="none" fo:border-right="0.74pt groove #2a6099" fo:border-top="0.74pt groove #2a6099"/>
      <style:text-properties style:font-name="Calibri" fo:font-size="10pt" style:font-size-asian="10pt" style:font-size-complex="10pt"/>
    </style:style>
    <style:style style:name="ce43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 fo:font-size="10pt" style:font-size-asian="10pt" style:font-size-complex="10pt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46" style:family="table-cell" style:parent-style-name="Default">
      <style:table-cell-properties fo:border-bottom="none" fo:border-left="0.74pt solid #000000" fo:border-right="0.74pt solid #000000" fo:border-top="non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visibility="collapse" table:number-rows-repeated="2">
          <table:table-cell table:style-name="Default"/>
          <table:table-cell table:style-name="ce3" table:number-columns-repeated="8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<text:s text:c="17"/>Elemento</text:p>
          </table:table-cell>
          <table:table-cell table:style-name="ce11"/>
          <table:table-cell table:style-name="ce11" office:value-type="string" calcext:value-type="string">
            <text:p>modelo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precio</text:p>
          </table:table-cell>
          <table:table-cell table:style-name="ce11"/>
          <table:table-cell table:style-name="ce11" office:value-type="string" calcext:value-type="string">
            <text:p>precio</text:p>
          </table:table-cell>
          <table:table-cell table:style-name="ce11"/>
          <table:table-cell table:style-name="ce42" office:value-type="string" calcext:value-type="string">
            <text:p>enlace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Inteligencia de negocio Pc </text:p>
          </table:table-cell>
          <table:table-cell table:style-name="ce12"/>
          <table:table-cell table:style-name="ce17" office:value-type="string" calcext:value-type="string">
            <text:p>Precision 5820 Torre workstation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2304.67" calcext:value-type="float">
            <text:p>2304,67</text:p>
          </table:table-cell>
          <table:table-cell table:style-name="ce28" office:value-type="string" calcext:value-type="string">
            <text:p>€</text:p>
          </table:table-cell>
          <table:table-cell table:style-name="ce34" table:formula="of:=[.F6]*[.E6]" office:value-type="float" office:value="4609.34" calcext:value-type="float">
            <text:p>4609,34</text:p>
          </table:table-cell>
          <table:table-cell table:style-name="ce28" office:value-type="string" calcext:value-type="string">
            <text:p>€</text:p>
          </table:table-cell>
          <table:table-cell table:style-name="ce43" office:value-type="string" calcext:value-type="string">
            <text:p><text:a xlink:href="https://www.dell.com/es-es/shop/sobremesas-y-estaciones-de-trabajo/precision-5820-torre-workstation/spd/precision-5820-workstation/xctopt5820emea?configurationid=49f5dcc6-8b19-4cb9-b871-bbb39eeb4294" xlink:type="simple">PC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Inteligencia de negocio Monitor </text:p>
          </table:table-cell>
          <table:table-cell table:style-name="ce13"/>
          <table:table-cell table:style-name="ce18" office:value-type="string" calcext:value-type="string">
            <text:p>Monitor Dell 24: E2423H</text:p>
          </table:table-cell>
          <table:table-cell table:style-name="ce22" office:value-type="float" office:value="4" calcext:value-type="float">
            <text:p>4</text:p>
          </table:table-cell>
          <table:table-cell table:style-name="ce7" office:value-type="float" office:value="97" calcext:value-type="float">
            <text:p>97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7]*[.E7]" office:value-type="float" office:value="388" calcext:value-type="float">
            <text:p>388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dell.com/es-es/shop/monitor-dell-24-e2423h/apd/210-bejd/monitores-y-accesorios" xlink:type="simple">Monitor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ecretaría académica Pc</text:p>
          </table:table-cell>
          <table:table-cell table:style-name="ce13"/>
          <table:table-cell table:style-name="ce18" office:value-type="string" calcext:value-type="string">
            <text:p>OptiPlex de formato micro</text:p>
          </table:table-cell>
          <table:table-cell table:style-name="ce22" office:value-type="float" office:value="3" calcext:value-type="float">
            <text:p>3</text:p>
          </table:table-cell>
          <table:table-cell table:style-name="ce7" office:value-type="float" office:value="443.53" calcext:value-type="float">
            <text:p>443,53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8]*[.E8]" office:value-type="float" office:value="1330.59" calcext:value-type="float">
            <text:p>1330,59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dell.com/es-es/shop/sobremesas-y-estaciones-de-trabajo/optiplex-micro-form-factor/spd/optiplex-7010-micro/s007o7010mffser_v_vp" xlink:type="simple">PC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ecretaría académica Monitor</text:p>
          </table:table-cell>
          <table:table-cell table:style-name="ce13"/>
          <table:table-cell table:style-name="ce18" office:value-type="string" calcext:value-type="string">
            <text:p>Monitor Dell 24: E2423H</text:p>
          </table:table-cell>
          <table:table-cell table:style-name="ce22" office:value-type="float" office:value="4" calcext:value-type="float">
            <text:p>4</text:p>
          </table:table-cell>
          <table:table-cell table:style-name="ce7" office:value-type="float" office:value="97" calcext:value-type="float">
            <text:p>97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9]*[.E9]" office:value-type="float" office:value="388" calcext:value-type="float">
            <text:p>388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dell.com/es-es/shop/monitor-dell-24-e2423h/apd/210-bejd/monitores-y-accesorios" xlink:type="simple">Monitor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Recepción Portatil</text:p>
          </table:table-cell>
          <table:table-cell table:style-name="ce13"/>
          <table:table-cell table:style-name="ce18" office:value-type="string" calcext:value-type="string">
            <text:p>Portátil Inspiron 15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453.72" calcext:value-type="float">
            <text:p>453,72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0]*[.E10]" office:value-type="float" office:value="907.44" calcext:value-type="float">
            <text:p>907,44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dell.com/es-es/shop/portátiles-dell/portátil-inspiron-15/spd/inspiron-15-3520-laptop/cn32034" xlink:type="simple">Portatil</text:a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<text:span text:style-name="T1">Recepción A</text:span>uriculares</text:p>
          </table:table-cell>
          <table:table-cell table:style-name="ce13"/>
          <table:table-cell table:style-name="ce18" office:value-type="string" calcext:value-type="string">
            <text:p>Auriculares con Micrófono PC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1]*[.E11]" office:value-type="float" office:value="30" calcext:value-type="float">
            <text:p>30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amazon.es/Trust-Roha-Auriculares-Almohadillas-Videoconferencia/dp/B08PC6MQNB/ref=sr_1_7?__mk_es_ES=ÅMÅŽÕÑ&amp;crid=112BMVQ3N40J6&amp;keywords=auriculares+microfono+recepcion&amp;qid=1701787991&amp;sprefix=auriculares+microfono+recepcion%2Caps%2C86&amp;sr=8-7" xlink:type="simple">Auriculares</text:a>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8" office:value-type="string" calcext:value-type="string">
            <text:p>I negocio, S académica Auriculares</text:p>
          </table:table-cell>
          <table:table-cell table:style-name="ce14"/>
          <table:table-cell table:style-name="ce18" office:value-type="string" calcext:value-type="string">
            <text:p>Auriculares con Cable USB y Webcam HD</text:p>
          </table:table-cell>
          <table:table-cell table:style-name="ce23" office:value-type="float" office:value="5" calcext:value-type="float">
            <text:p>5</text:p>
          </table:table-cell>
          <table:table-cell table:style-name="ce9" office:value-type="float" office:value="14.97" calcext:value-type="float">
            <text:p>14,97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2]*[.E12]" office:value-type="float" office:value="74.85" calcext:value-type="float">
            <text:p>74,85</text:p>
          </table:table-cell>
          <table:table-cell table:style-name="ce29" office:value-type="string" calcext:value-type="string">
            <text:p>€</text:p>
          </table:table-cell>
          <table:table-cell table:style-name="ce44" office:value-type="string" calcext:value-type="string">
            <text:p><text:a xlink:href="https://www.amazon.es/Trust-Auriculares-Microfono-Portátil-Videoconferencia/dp/B08KZ7KM14/ref=sr_1_1?__mk_es_ES=ÅMÅŽÕÑ&amp;crid=255QYOYLSUC7Q&amp;keywords=kit+auriculares+microfono+webcam&amp;qid=1701787711&amp;sprefix=kit+auriculares+microfono+webcam%2Caps%2C84&amp;sr=8-1" xlink:type="simple">Kit videoconferencia</text:a></text:p>
          </table:table-cell>
          <table:table-cell table:style-name="ce3" table:number-columns-repeated="1013"/>
        </table:table-row>
        <table:table-row table:style-name="ro2">
          <table:table-cell/>
          <table:table-cell table:style-name="ce8" office:value-type="string" calcext:value-type="string">
            <text:p>Impresora</text:p>
          </table:table-cell>
          <table:table-cell table:style-name="ce14"/>
          <table:table-cell table:style-name="ce18" office:value-type="string" calcext:value-type="string">
            <text:p>HP LaserJet Tank 2604sdw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35.41" calcext:value-type="float">
            <text:p>235,41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3]*[.E13]" office:value-type="float" office:value="706.23" calcext:value-type="float">
            <text:p>706,23</text:p>
          </table:table-cell>
          <table:table-cell table:style-name="ce29" office:value-type="string" calcext:value-type="string">
            <text:p>€</text:p>
          </table:table-cell>
          <table:table-cell table:style-name="ce45" office:value-type="string" calcext:value-type="string">
            <text:p><text:a xlink:href="https://www.hp.com/es-es/shop/product.aspx?id=381V1A&amp;opt=B19&amp;sel=PRN&amp;gad_source=1&amp;gclid=CjwKCAiAjrarBhAWEiwA2qWdCPbLC2I-Tt0vEy_eNy_sht1bXeZ9h6sXFpS-PfgjDdO3OEWH4EtOLxoCYq0QAvD_BwE&amp;gclsrc=aw.ds" xlink:type="simple">Impresora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ervidor</text:p>
          </table:table-cell>
          <table:table-cell table:style-name="ce13"/>
          <table:table-cell table:style-name="ce18" office:value-type="string" calcext:value-type="string">
            <text:p>Smart Selection PowerEdge R350 Servidor Rack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3339.6" calcext:value-type="float">
            <text:p>3339,6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4]*[.E14]" office:value-type="float" office:value="3339.6" calcext:value-type="float">
            <text:p>3339,6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dell.com/es-es/shop/servidores-almacenamiento-y-redes/smart-selection-poweredge-r350-servidor-rack/spd/poweredge-r350/per3501a?configurationid=a0a8aea1-6dd3-48e2-8ced-d99f6b832db6" xlink:type="simple">Servidor</text:a></text:p>
          </table:table-cell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Switch</text:p>
          </table:table-cell>
          <table:table-cell table:style-name="ce15"/>
          <table:table-cell table:style-name="ce18" office:value-type="string" calcext:value-type="string">
            <text:p>Switch KVM remoto de 16 puertos Dell DMPU2016-G01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406.88" calcext:value-type="float">
            <text:p>3406,88</text:p>
          </table:table-cell>
          <table:table-cell table:style-name="ce29" office:value-type="string" calcext:value-type="string">
            <text:p>€</text:p>
          </table:table-cell>
          <table:table-cell table:style-name="ce35" table:formula="of:=[.F15]*[.E15]" office:value-type="float" office:value="3406.88" calcext:value-type="float">
            <text:p>3406,88</text:p>
          </table:table-cell>
          <table:table-cell table:style-name="ce29" office:value-type="string" calcext:value-type="string">
            <text:p>€</text:p>
          </table:table-cell>
          <table:table-cell table:style-name="ce46" office:value-type="string" calcext:value-type="string">
            <text:p><text:a xlink:href="https://www.dell.com/es-es/shop/switch-kvm-remoto-de-16-puertos-dell-dmpu2016-g01-con-dos-usuarios-remotos-un-usuario-local-y-doble-fuente-de-alimentación/apd/a7485893/soluciones-de-red-para-el-hogar" xlink:type="simple">Switch</text:a></text:p>
          </table:table-cell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Patch panel </text:p>
          </table:table-cell>
          <table:table-cell table:style-name="ce15"/>
          <table:table-cell table:style-name="ce18" office:value-type="string" calcext:value-type="string">
            <text:p>Adaptadores FHU 1U 19'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49" calcext:value-type="float">
            <text:p>49</text:p>
          </table:table-cell>
          <table:table-cell table:style-name="ce29" office:value-type="string" calcext:value-type="string">
            <text:p>€</text:p>
          </table:table-cell>
          <table:table-cell table:style-name="ce36" table:formula="of:=[.F16]*[.E16]" office:value-type="float" office:value="49" calcext:value-type="float">
            <text:p>49</text:p>
          </table:table-cell>
          <table:table-cell table:style-name="ce29" office:value-type="string" calcext:value-type="string">
            <text:p>€</text:p>
          </table:table-cell>
          <table:table-cell table:style-name="ce46" office:value-type="string" calcext:value-type="string">
            <text:p><text:a xlink:href="https://www.fs.com/es/products/35530.html?country=ES&amp;currency=EUR&amp;languages=Español&amp;paid=google_shopping&amp;utm_country=1005430&amp;gad_source=1&amp;gclid=Cj0KCQiAsburBhCIARIsAExmsu7ArpwO0GlEYWdKCF0Bt0auWayMonQxiLLRymvCeZwHGLWHjtycwdcaAhowEALw_wcB" xlink:type="simple">PatchPanel</text:a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Cable ethernet</text:p>
          </table:table-cell>
          <table:table-cell table:style-name="ce13"/>
          <table:table-cell table:style-name="ce19" office:value-type="string" calcext:value-type="string">
            <text:p>Cable Red Rígido UTP Cat. 6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2.5" calcext:value-type="float">
            <text:p>22,5</text:p>
          </table:table-cell>
          <table:table-cell table:style-name="ce29" office:value-type="string" calcext:value-type="string">
            <text:p>€</text:p>
          </table:table-cell>
          <table:table-cell table:style-name="ce36" table:formula="of:=[.F17]*[.E17]" office:value-type="float" office:value="22.5" calcext:value-type="float">
            <text:p>22,5</text:p>
          </table:table-cell>
          <table:table-cell table:style-name="ce29" office:value-type="string" calcext:value-type="string">
            <text:p>€</text:p>
          </table:table-cell>
          <table:table-cell table:style-name="ce19" office:value-type="string" calcext:value-type="string">
            <text:p><text:a xlink:href="https://www.pccomponentes.com/bobina-100m-cable-red-r-gido-utp-cat--6-10-100-1000" xlink:type="simple">Cable Ethernet</text:a>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 calcext:value-type="string">
            <text:p>Roseta de superficie ethernet</text:p>
          </table:table-cell>
          <table:table-cell table:style-name="ce16"/>
          <table:table-cell table:style-name="ce20" office:value-type="string" calcext:value-type="string">
            <text:p>Nanocable Roseta de Superficie RJ45 Cat.6 FTP 2 </text:p>
          </table:table-cell>
          <table:table-cell table:style-name="ce25" office:value-type="float" office:value="7" calcext:value-type="float">
            <text:p>7</text:p>
          </table:table-cell>
          <table:table-cell table:style-name="ce10" office:value-type="float" office:value="2.42" calcext:value-type="float">
            <text:p>2,42</text:p>
          </table:table-cell>
          <table:table-cell table:style-name="ce30" office:value-type="string" calcext:value-type="string">
            <text:p>€</text:p>
          </table:table-cell>
          <table:table-cell table:style-name="ce36" table:formula="of:=[.F18]*[.E18]" office:value-type="float" office:value="16.94" calcext:value-type="float">
            <text:p>16,94</text:p>
          </table:table-cell>
          <table:table-cell table:style-name="ce29" office:value-type="string" calcext:value-type="string">
            <text:p>€</text:p>
          </table:table-cell>
          <table:table-cell table:style-name="ce47" office:value-type="string" calcext:value-type="string">
            <text:p><text:a xlink:href="https://www.pccomponentes.com/nanocable-roseta-de-superficie-rj45-cat6-ftp-2-tomas-blanca" xlink:type="simple">RosetaEthernet</text:a>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5"/>
          <table:table-cell table:style-name="ce31"/>
          <table:table-cell table:style-name="ce31" table:formula="of:=[.H6]+[.H7]+[.H8]+[.H9]+[.H10]+[.H11]+[.H12]+[.H13]+[.H14]+[.H15]+[.H16]+[.H17]+[.H18]" office:value-type="float" office:value="15269.37" calcext:value-type="float">
            <text:p>15269,37</text:p>
          </table:table-cell>
          <table:table-cell table:style-name="ce39" office:value-type="string" calcext:value-type="string">
            <text:p>€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 table:style-name="ce32" office:value-type="string" calcext:value-type="string">
            <text:p>IGI</text:p>
          </table:table-cell>
          <table:table-cell table:style-name="ce37" table:formula="of:=[.H19]*4.5/100" office:value-type="float" office:value="687.12165" calcext:value-type="float">
            <text:p>687,12165</text:p>
          </table:table-cell>
          <table:table-cell table:style-name="ce40" office:value-type="string" calcext:value-type="string">
            <text:p>€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5"/>
          <table:table-cell table:style-name="ce33" office:value-type="string" calcext:value-type="string">
            <text:p>Total</text:p>
          </table:table-cell>
          <table:table-cell table:style-name="ce38" table:formula="of:=[.H19]+[.H20]" office:value-type="float" office:value="15956.49165" calcext:value-type="float">
            <text:p>15956,49165</text:p>
          </table:table-cell>
          <table:table-cell table:style-name="ce41" office:value-type="string" calcext:value-type="string">
            <text:p>€</text:p>
          </table:table-cell>
          <table:table-cell table:number-columns-repeated="1014"/>
        </table:table-row>
        <table:table-row table:style-name="ro2" table:number-rows-repeated="7">
          <table:table-cell/>
          <table:table-cell table:style-name="ce3" table:number-columns-repeated="8"/>
          <table:table-cell table:number-columns-repeated="1014"/>
        </table:table-row>
        <table:table-row table:style-name="ro2" table:number-rows-repeated="1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39:18.609322623</meta:creation-date>
    <dc:date>2023-12-05T21:26:46.156785823</dc:date>
    <meta:editing-duration>PT41M</meta:editing-duration>
    <meta:editing-cycles>5</meta:editing-cycles>
    <meta:generator>LibreOffice/7.3.7.2$Linux_X86_64 LibreOffice_project/30$Build-2</meta:generator>
    <meta:document-statistic meta:table-count="1" meta:cell-count="118" meta:object-count="0"/>
    <meta:user-defined meta:name=""/>
  </office:meta>
</office:document-meta>
</file>